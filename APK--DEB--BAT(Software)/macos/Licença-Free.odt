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xmlns:svg="urn:oasis:names:tc:opendocument:xmlns:svg-compatible:1.0" xmlns:draw="urn:oasis:names:tc:opendocument:xmlns:drawing:1.0" xmlns:xlink="http://www.w3.org/1999/xlink" xmlns:table="urn:oasis:names:tc:opendocument:xmlns:table:1.0" xmlns:meta="urn:oasis:names:tc:opendocument:xmlns:meta:1.0" xmlns:number="urn:oasis:names:tc:opendocument:xmlns:datastyle:1.0" xmlns:ooo="http://openoffice.org/2004/office" xmlns:ooow="http://openoffice.org/2004/writer" xmlns:dc="http://purl.org/dc/elements/1.1/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fo:font-weight="bold" style:font-weight-asian="bold"/>
    </style:style>
    <style:style style:name="P_Title" style:family="paragraph" style:parent-style-name="Standard">
      <style:paragraph-properties fo:text-align="center" fo:margin-top="0.8cm" fo:margin-bottom="0.3cm"/>
      <style:text-properties style:font-name="Carlito" fo:font-size="18pt" fo:font-weight="bold"/>
    </style:style>
    <style:style style:name="P_Subtitle" style:family="paragraph" style:parent-style-name="Standard">
      <style:paragraph-properties fo:text-align="center" fo:margin-bottom="0.6cm"/>
      <style:text-properties style:font-name="Carlito" fo:font-size="13pt" fo:font-style="italic" fo:color="#444444"/>
    </style:style>
    <style:style style:name="P_ClauseTitle" style:family="paragraph" style:parent-style-name="Standard">
      <style:paragraph-properties fo:margin-top="0.5cm" fo:margin-bottom="0.15cm"/>
      <style:text-properties style:font-name="Carlito" fo:font-size="12pt" fo:font-weight="bold"/>
    </style:style>
    <style:style style:name="P_ClauseTitleNum" style:family="paragraph" style:parent-style-name="Standard">
      <style:paragraph-properties fo:margin-top="0.5cm" fo:margin-bottom="0.15cm"/>
      <style:text-properties style:font-name="Carlito" fo:font-size="12pt" fo:font-weight="bold" fo:color="#2c3e50"/>
    </style:style>
    <style:style style:name="P_Body" style:family="paragraph" style:parent-style-name="Standard">
      <style:paragraph-properties fo:margin-top="0.15cm" fo:margin-bottom="0.15cm" fo:margin-left="0.3cm"/>
      <style:text-properties style:font-name="Carlito" fo:font-size="11pt" fo:color="#222222"/>
    </style:style>
    <style:style style:name="P_BodyIndent" style:family="paragraph" style:parent-style-name="Standard">
      <style:paragraph-properties fo:margin-top="0.1cm" fo:margin-bottom="0.1cm" fo:margin-left="0.6cm"/>
      <style:text-properties style:font-name="Carlito" fo:font-size="11pt" fo:color="#222222"/>
    </style:style>
    <style:style style:name="P_Separator" style:family="paragraph" style:parent-style-name="Standard">
      <style:paragraph-properties fo:text-align="center" fo:margin-top="0.4cm" fo:margin-bottom="0.4cm"/>
      <style:text-properties style:font-name="Carlito" fo:font-size="10pt" fo:color="#999999"/>
    </style:style>
    <style:style style:name="P_TokenLabel" style:family="paragraph" style:parent-style-name="Standard">
      <style:paragraph-properties fo:text-align="center" fo:margin-top="0.6cm" fo:margin-bottom="0.1cm"/>
      <style:text-properties style:font-name="Carlito" fo:font-size="10pt" fo:font-weight="bold" fo:color="#2c3e50"/>
    </style:style>
    <style:style style:name="P_TokenBox" style:family="paragraph" style:parent-style-name="Standard">
      <style:paragraph-properties fo:text-align="center" fo:margin-top="0.15cm" fo:margin-bottom="0.3cm" fo:margin-left="0.5cm" fo:margin-right="0.5cm" fo:padding="0.3cm" fo:border="0.5pt solid #2c3e50" fo:background-color="#f0f4f8"/>
      <style:text-properties style:font-name="Carlito" fo:font-size="9pt" fo:font-weight="bold" fo:color="#1a1a2e"/>
    </style:style>
    <style:style style:name="P_TokenHint" style:family="paragraph" style:parent-style-name="Standard">
      <style:paragraph-properties fo:text-align="center" fo:margin-bottom="0.4cm"/>
      <style:text-properties style:font-name="Carlito" fo:font-size="9pt" fo:color="#555555"/>
    </style:style>
    <style:style style:name="P_Footer" style:family="paragraph" style:parent-style-name="Standard">
      <style:paragraph-properties fo:text-align="center" fo:margin-top="0.6cm"/>
      <style:text-properties style:font-name="Carlito" fo:font-size="9pt" fo:color="#888888" fo:font-style="italic"/>
    </style:style>
  </office:automatic-styles>
  <office:body>
    <office:text>
      <text:p text:style-name="P_Title">CONTRATO DE LICENÇA DE USO DE SOFTWARE</text:p>
      <text:p text:style-name="P_Subtitle">Gerenciador ERP — Plano Gratuito (Free)</text:p>
      <text:p text:style-name="P_Separator">━━━━━━━━━━━━━━━━━━━━━━━━━━━━━━━━━━━━━━━━━━</text:p>
      <text:p text:style-name="P_Body">Este Contrato de Licença de Uso de Software ("Contrato") é celebrado entre <text:span text:style-name="T1">Gerenciador ERP Tecnologia Ltda.</text:span>, doravante denominada "Licenciante", e o usuário do software, doravante denominado "Licenciado", mediante a adesão aos termos aqui descritos.</text:p>
      <text:p text:style-name="P_Body">A utilização do software implica na aceitação plena e irretratável de todas as cláusulas e condições deste instrumento.</text:p>
      <text:p text:style-name="P_ClauseTitleNum">1. DEFINIÇÕES</text:p>
      <text:p text:style-name="P_Body">Para os fins deste Contrato, aplicam-se as seguintes definições:</text:p>
      <text:p text:style-name="P_BodyIndent"><text:span text:style-name="T1">I. Software:</text:span> sistema web de gestão de estoque denominado "Gerenciador ERP", incluindo suas funcionalidades, interfaces, documentação e atualizações.</text:p>
      <text:p text:style-name="P_BodyIndent"><text:span text:style-name="T1">II. Plano Free:</text:span> modalidade gratuita de licenciamento que define as funcionalidades e limites do software, conforme descrito na Cláusula 4.</text:p>
      <text:p text:style-name="P_BodyIndent"><text:span text:style-name="T1">III. Licenciado:</text:span> pessoa física ou jurídica que utiliza o software nos termos deste Contrato.</text:p>
      <text:p text:style-name="P_BodyIndent"><text:span text:style-name="T1">IV. Licenciante:</text:span> Gerenciador ERP Tecnologia Ltda., proprietária e desenvolvedora do software.</text:p>
      <text:p text:style-name="P_ClauseTitleNum">2. OBJETO</text:p>
      <text:p text:style-name="P_Body">O presente Contrato tem por objeto a concessão, pelo Licenciante ao Licenciado, de licença de uso não-exclusiva, intransferível, não-sublicenciável do software Gerenciador ERP, na modalidade gratuita (Plano Free), para fins de gestão de estoque e operações correlatas.</text:p>
      <text:p text:style-name="P_ClauseTitleNum">3. CONCESSÃO DA LICENÇA</text:p>
      <text:p text:style-name="P_Body">3.1. O Licenciante concede ao Licenciado o direito de instalar, acessar e utilizar o software em servidor próprio ou contratado, exclusivamente para suas operações internas.</text:p>
      <text:p text:style-name="P_Body">3.2. A licença é concedida em caráter <text:span text:style-name="T1">gratuito</text:span>, sem qualquer contraprestação financeira, pelo período de vigência deste Contrato.</text:p>
      <text:p text:style-name="P_Body">3.3. O Licenciado não adquire qualquer direito de propriedade sobre o software, permanecendo todos os direitos reservados ao Licenciante.</text:p>
      <text:p text:style-name="P_ClauseTitleNum">4. PLANOS E LIMITAÇÕES</text:p>
      <text:p text:style-name="P_Body">O software é oferecido no Plano Free, com as seguintes funcionalidades e limites:</text:p>
      <text:p text:style-name="P_BodyIndent"><text:span text:style-name="T1">Free (gratuito):</text:span> até 50 produtos, 1 usuário. Inclui dashboard, produtos, importação, PWA.</text:p>
      <text:p text:style-name="P_ClauseTitleNum">5. DIREITOS E DEVERES DO LICENCIANTE</text:p>
      <text:p text:style-name="P_Body">5.1. O Licenciante se compromete a disponibilizar o software para uso conforme as especificações do Plano Free.</text:p>
      <text:p text:style-name="P_Body">5.2. O Licenciante poderá, a qualquer tempo e sem aviso prévio:</text:p>
      <text:p text:style-name="P_BodyIndent">a) Realizar atualizações, correções e melhorias no software;</text:p>
      <text:p text:style-name="P_BodyIndent">b) Modificar as limitações e funcionalidades do Plano Free;</text:p>
      <text:p text:style-name="P_BodyIndent">c) Descontinuar o Plano Free, mediante comunicação aos usuários com prazo razoável.</text:p>
      <text:p text:style-name="P_Body">5.3. O Licenciante não garante a disponibilidade ininterrupta do software, envidando esforços comercialmente aceitáveis para sua manutenção.</text:p>
      <text:p text:style-name="P_ClauseTitleNum">6. DIREITOS E DEVERES DO LICENCIADO</text:p>
      <text:p text:style-name="P_Body">6.1. São deveres do Licenciado:</text:p>
      <text:p text:style-name="P_BodyIndent">a) Utilizar o software em conformidade com a legislação vigente;</text:p>
      <text:p text:style-name="P_BodyIndent">b) Manter a confidencialidade de suas credenciais de acesso;</text:p>
      <text:p text:style-name="P_BodyIndent">c) Realizar backups periódicos de seus dados;</text:p>
      <text:p text:style-name="P_BodyIndent">d) Comunicar imediatamente ao Licenciante qualquer uso não autorizado do software.</text:p>
      <text:p text:style-name="P_Body">6.2. É <text:span text:style-name="T1">expressamente proibido</text:span> ao Licenciado:</text:p>
      <text:p text:style-name="P_BodyIndent">a) Distribuir, sublicenciar, alugar ou ceder o software a terceiros;</text:p>
      <text:p text:style-name="P_BodyIndent">b) Realizar engenharia reversa, descompilar ou modificar o código-fonte;</text:p>
      <text:p text:style-name="P_BodyIndent">c) Utilizar o software para fins ilícitos ou que violem direitos de terceiros;</text:p>
      <text:p text:style-name="P_BodyIndent">d) Remover ou alterar avisos de direitos autorais ou propriedade intelectual.</text:p>
      <text:p text:style-name="P_ClauseTitleNum">7. PROPRIEDADE INTELECTUAL</text:p>
      <text:p text:style-name="P_Body">7.1. Todos os direitos de propriedade intelectual sobre o software, incluindo código-fonte, interface, layout, marca, logotipo e documentação, pertencem exclusivamente ao Licenciante.</text:p>
      <text:p text:style-name="P_Body">7.2. Este Contrato não transfere ao Licenciado qualquer direito de propriedade intelectual, limitando-se à concessão da licença de uso descrita na Cláusula 3.</text:p>
      <text:p text:style-name="P_Body">7.3. O software é protegido pela <text:span text:style-name="T1">Lei nº 9.609/98</text:span> (Lei de Software) e pela <text:span text:style-name="T1">Lei nº 9.610/98</text:span> (Lei de Direitos Autorais).</text:p>
      <text:p text:style-name="P_ClauseTitleNum">8. ISENÇÃO DE GARANTIA</text:p>
      <text:p text:style-name="P_Body">8.1. O software é fornecido <text:span text:style-name="T1">"no estado em que se encontra"</text:span> ("as is"), sem garantias de qualquer natureza, expressas ou implícitas.</text:p>
      <text:p text:style-name="P_Body">8.2. O Licenciante <text:span text:style-name="T1">não garante</text:span> que o software atenda a requisitos específicos do Licenciado, nem que seu funcionamento seja livre de erros, interrupções ou vulnerabilidades.</text:p>
      <text:p text:style-name="P_Body">8.3. O Licenciado assume integral responsabilidade pela escolha e utilização do software, bem como pelos resultados obtidos.</text:p>
      <text:p text:style-name="P_ClauseTitleNum">9. LIMITAÇÃO DE RESPONSABILIDADE</text:p>
      <text:p text:style-name="P_Body">9.1. Em nenhuma hipótese o Licenciante será responsável por:</text:p>
      <text:p text:style-name="P_BodyIndent">a) Perda, corrupção ou violação de dados armazenados no software;</text:p>
      <text:p text:style-name="P_BodyIndent">b) Lucros cessantes, perda de receita ou oportunidades de negócio;</text:p>
      <text:p text:style-name="P_BodyIndent">c) Danos diretos, indiretos, incidentais, especiais ou consequenciais decorrentes do uso ou impossibilidade de uso do software;</text:p>
      <text:p text:style-name="P_BodyIndent">d) Ações de terceiros contra o Licenciado.</text:p>
      <text:p text:style-name="P_Body">9.2. A responsabilidade máxima do Licenciante, em qualquer caso, estará limitada ao valor efetivamente pago pelo Licenciado pelo uso do software, que é de <text:span text:style-name="T1">R$ 0,00 (zero reais)</text:span>.</text:p>
      <text:p text:style-name="P_ClauseTitleNum">10. VIGÊNCIA E RESCISÃO</text:p>
      <text:p text:style-name="P_Body">10.1. Este Contrato entra em vigor no momento em que o Licenciado utilizar o software pela primeira vez e vigorará por prazo indeterminado.</text:p>
      <text:p text:style-name="P_Body">10.2. O Licenciante poderá rescindir este Contrato imediatamente, sem aviso prévio, caso:</text:p>
      <text:p text:style-name="P_BodyIndent">a) O Licenciado viole qualquer cláusula deste instrumento;</text:p>
      <text:p text:style-name="P_BodyIndent">b) O Licenciado utilize o software para fins ilícitos;</text:p>
      <text:p text:style-name="P_BodyIndent">c) O Licenciante decida descontinuar o plano contratado.</text:p>
      <text:p text:style-name="P_Body">10.3. Rescindido o Contrato, o Licenciado deverá cessar imediatamente o uso do software e eliminar todas as suas cópias.</text:p>
      <text:p text:style-name="P_ClauseTitleNum">11. DISPOSIÇÕES GERAIS</text:p>
      <text:p text:style-name="P_Body">11.1. Este Contrato constitui o acordo integral entre as partes, substituindo quaisquer entendimentos ou acordos anteriores.</text:p>
      <text:p text:style-name="P_Body">11.2. As cláusulas deste Contrato são regidas pela legislação brasileira, em especial pela <text:span text:style-name="T1">Lei nº 9.609/98</text:span> (Programas de Computador), <text:span text:style-name="T1">Lei nº 10.406/02</text:span> (Código Civil) e <text:span text:style-name="T1">Lei nº 13.709/18</text:span> (LGPD).</text:p>
      <text:p text:style-name="P_Body">11.3. Fica eleito o foro da Comarca da cidade do Licenciante para dirimir quaisquer controvérsias decorrentes deste Contrato, com renúncia a qualquer outro, por mais privilegiado que seja.</text:p>
      <text:p text:style-name="P_Body">11.4. Se qualquer cláusula deste Contrato for considerada inválida ou inexequível, as demais permanecerão em pleno vigor.</text:p>
      <text:p text:style-name="P_Separator">━━━━━━━━━━━━━━━━━━━━━━━━━━━━━━━━━━━━━━━━━━</text:p>
      <text:p text:style-name="P_Title">ACEITAÇÃO</text:p>
      <text:p text:style-name="P_Body">O Licenciado reconhece que a <text:span text:style-name="T1">utilização do software</text:span>, incluindo a instalação, o acesso ou o uso de qualquer funcionalidade, <text:span text:style-name="T1">implica na aceitação plena e irretratável</text:span> de todos os termos e condições deste Contrato de Licença.</text:p>
      <text:p text:style-name="P_Body">Caso não concorde com qualquer disposição aqui contida, o Licenciado não deverá instalar, acessar ou utilizar o software.</text:p>
      <text:p text:style-name="P_Separator">━━━━━━━━━━━━━━━━━━━━━━━━━━━━━━━━━━━━━━━━━━</text:p>
      <text:p text:style-name="P_TokenLabel">⬡ SEU TOKEN DE LICENÇA</text:p>
      <text:p text:style-name="P_TokenBox">[cole aqui o token fornecido pelo desenvolvedor]</text:p>
      <text:p text:style-name="P_TokenHint">Copie o token fornecido, acesse o sistema em /license e cole no campo de ativação. O plano será liberado automaticamente conforme o token.</text:p>
      <text:p text:style-name="P_Separator">━━━━━━━━━━━━━━━━━━━━━━━━━━━━━━━━━━━━━━━━━━</text:p>
      <text:p text:style-name="P_Footer">Gerenciador ERP Tecnologia Ltda. — © 2026. Todos os direitos reservados.</text:p>
      <text:p text:style-name="P_Footer">Este documento é gerado eletronicamente e tem validade legal conforme Lei nº 12.682/12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5T09:22:55.116753454</meta:creation-date>
    <dc:date>2026-06-15T09:24:06.139461173</dc:date>
    <meta:editing-duration>PT1M1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